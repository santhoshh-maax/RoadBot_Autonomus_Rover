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28">
      <style:graphic-properties draw:fill="none" draw:stroke="solid" svg:stroke-width="0in" svg:stroke-color="#000000" draw:marker-end="a627" svg:stroke-opacity="100%"/>
    </style:style>
    <style:style style:family="graphic" style:name="a629" style:parent-style-name="Graphics">
      <style:graphic-properties draw:fill="none" fo:clip="rect(0in, 0in, 0in, 0in)" draw:stroke="none" draw:luminance="0%" draw:contrast="0%" draw:image-opacity="100%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.50001in, 0.83305in, 0.62481in, 0.74999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571" style:parent-style-name="Graphics">
      <style:graphic-properties draw:fill="none" fo:clip="rect(0.74961in, 0.91889in, 0.6252in, 0.92442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5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3" style:parent-style-name="Graphics">
      <style:graphic-properties draw:fill="none" fo:clip="rect(0in, 0.12205in, 0in, 0.12755in)" draw:stroke="none" draw:luminance="0%" draw:contrast="0%" draw:image-opacity="100%"/>
    </style:style>
    <style:style style:family="graphic" style:name="a574" style:parent-style-name="Graphics">
      <style:graphic-properties draw:fill="none" fo:clip="rect(2.22406in, 2.47406in, 1.05271in, 2.48229in)" draw:stroke="none" draw:luminance="0%" draw:contrast="0%" draw:image-opacity="100%"/>
    </style:style>
    <style:style style:family="graphic" style:name="a576">
      <style:graphic-properties draw:fill="none" draw:stroke="solid" svg:stroke-width="0in" svg:stroke-color="#000000" draw:marker-end="a575" svg:stroke-opacity="100%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37" svg:stroke-opacity="100%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80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579" svg:stroke-opacity="100%" draw:auto-grow-width="false" draw:auto-grow-height="false"/>
      <style:paragraph-properties style:font-independent-line-spacing="false" style:writing-mode="lr-tb"/>
    </style:style>
    <style:style style:family="graphic" style:name="a582">
      <style:graphic-properties draw:fill="none" draw:stroke="solid" svg:stroke-width="0in" svg:stroke-color="#000000" draw:marker-end="a581" svg:stroke-opacity="100%"/>
    </style:style>
    <style:style style:family="graphic" style:name="a583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586" svg:stroke-opacity="100%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draw:fill="none" draw:stroke="solid" svg:stroke-width="0in" svg:stroke-color="#000000" draw:marker-end="a588" svg:stroke-opacity="100%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8" draw:name="TextBox 1" svg:x="0.80236in" svg:y="2in" svg:width="2.69764in" svg:height="0.53583in">
          <draw:text-box>
            <text:p text:style-name="a567" text:class-names="" text:cond-style-name=""><text:span text:style-name="a566" text:class-names="">Real Sense Depth Camera</text:span></text:p>
          </draw:text-box>
          <svg:title/>
          <svg:desc/>
        </draw:frame>
        <draw:frame draw:id="id74" draw:style-name="a569" draw:transform="translate(-1.14291in -0.48287in) rotate(-6.26765) translate(2.15028in 1.74932in)" svg:width="2.28583in" svg:height="0.96575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70" svg:x="4.75in" svg:y="0.5in" svg:width="1.99961in" svg:height="0.74961in" style:rel-width="scale" style:rel-height="scale">
          <draw:image xlink:href="media/image2.jpg" xlink:type="simple" xlink:show="embed" xlink:actuate="onLoad"/>
          <svg:title/>
          <svg:desc/>
        </draw:frame>
        <draw:frame draw:id="id76" draw:style-name="a571" svg:x="4.75in" svg:y="2.00039in" svg:width="1.74961in" svg:height="0.49961in" style:rel-width="scale" style:rel-height="scale">
          <draw:image xlink:href="media/image3.jpg" xlink:type="simple" xlink:show="embed" xlink:actuate="onLoad"/>
          <svg:title/>
          <svg:desc/>
        </draw:frame>
        <draw:frame draw:id="id77" draw:style-name="a572" svg:x="4.8752in" svg:y="3.5in" svg:width="1.3748in" svg:height="1.3748in" style:rel-width="scale" style:rel-height="scale">
          <draw:image xlink:href="media/image4.jpg" xlink:type="simple" xlink:show="embed" xlink:actuate="onLoad"/>
          <svg:title/>
          <svg:desc/>
        </draw:frame>
        <draw:frame draw:id="id78" draw:style-name="a573" draw:transform="translate(-1.1248in -0.9374in) rotate(-0.19722) translate(9.12522in 2.93727in)" svg:width="2.24961in" svg:height="1.8748in" style:rel-width="scale" style:rel-height="scale">
          <draw:image xlink:href="media/image5.jpg" xlink:type="simple" xlink:show="embed" xlink:actuate="onLoad"/>
          <svg:title/>
          <svg:desc/>
        </draw:frame>
        <draw:frame draw:id="id79" draw:style-name="a574" svg:x="8.73543in" svg:y="0.25in" svg:width="0.76457in" svg:height="1in" style:rel-width="scale" style:rel-height="scale">
          <draw:image xlink:href="media/image6.png" xlink:type="simple" xlink:show="embed" xlink:actuate="onLoad"/>
          <svg:title/>
          <svg:desc/>
        </draw:frame>
        <draw:connector draw:type="standard" svg:x1="3.93824in" svg:y1="0.45474in" draw:start-shape="id74" draw:start-glue-point="0" svg:x2="2.95454in" svg:y2="3.06196in" draw:end-shape="id76" draw:end-glue-point="3" draw:id="id80" draw:style-name="a576" draw:transform="translate(-3.44639in -1.75835in) rotate(-4.71239) translate(3.44639in 1.75835in)" draw:name="Connector: Elbow 8">
          <svg:title/>
          <svg:desc/>
        </draw:connector>
        <draw:custom-shape svg:x="5.75in" svg:y="1.24961in" svg:width="0in" svg:height="0.75079in" draw:id="id81" draw:style-name="a580" draw:name="Straight Connector 9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type="standard" svg:x1="6.49961in" svg:y1="2.2502in" draw:start-shape="id76" draw:start-glue-point="1" svg:x2="8.02223in" svg:y2="2.71687in" draw:end-shape="id78" draw:end-glue-point="3" draw:id="id82" draw:style-name="a582" draw:name="Connector: Elbow 10">
          <svg:title/>
          <svg:desc/>
        </draw:connector>
        <draw:frame draw:id="id83" draw:style-name="a583" svg:x="7.66181in" svg:y="4.25in" svg:width="3.08819in" svg:height="1.75in" style:rel-width="scale" style:rel-height="scale">
          <draw:image xlink:href="media/image7.jpg" xlink:type="simple" xlink:show="embed" xlink:actuate="onLoad"/>
          <svg:title/>
          <svg:desc/>
        </draw:frame>
        <draw:custom-shape svg:x="9.25in" svg:y="3.5in" svg:width="0in" svg:height="0.5in" draw:id="id84" draw:style-name="a587" draw:name="Straight Connector 12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type="standard" svg:x1="7.91299in" svg:y1="3.43071in" svg:x2="6.25in" svg:y2="4.1874in" draw:end-shape="id77" draw:end-glue-point="1" draw:id="id85" draw:style-name="a589" draw:name="Connector: Elbow 13">
          <svg:title/>
          <svg:desc/>
        </draw:connector>
        <draw:frame draw:id="id86" draw:style-name="a592" draw:name="TextBox 14" svg:x="1.67717in" svg:y="2.31732in" svg:width="0.82283in" svg:height="0.37874in">
          <draw:text-box>
            <text:p text:style-name="a591" text:class-names="" text:cond-style-name=""><text:span text:style-name="a590" text:class-names="">d455f</text:span></text:p>
          </draw:text-box>
          <svg:title/>
          <svg:desc/>
        </draw:frame>
        <draw:frame draw:id="id87" draw:style-name="a595" draw:name="TextBox 15" svg:x="1.85748in" svg:y="0.75in" svg:width="2.64252in" svg:height="0.28543in">
          <draw:text-box>
            <text:p text:style-name="a594" text:class-names="" text:cond-style-name=""><text:span text:style-name="a593" text:class-names="">Inputs video and sends frames</text:span></text:p>
          </draw:text-box>
          <svg:title/>
          <svg:desc/>
        </draw:frame>
        <draw:frame draw:id="id88" draw:style-name="a604" draw:name="TextBox 16" svg:x="6.75in" svg:y="0.5in" svg:width="1.0811in" svg:height="0.84528in">
          <draw:text-box>
            <text:p text:style-name="a597" text:class-names="" text:cond-style-name=""><text:span text:style-name="a596" text:class-names="">Train AI</text:span></text:p>
            <text:p text:style-name="a599" text:class-names="" text:cond-style-name=""><text:span text:style-name="a598" text:class-names="">Model</text:span></text:p>
            <text:p text:style-name="a601" text:class-names="" text:cond-style-name=""><text:span text:style-name="a600" text:class-names="">Using 400+</text:span></text:p>
            <text:p text:style-name="a603" text:class-names="" text:cond-style-name=""><text:span text:style-name="a602" text:class-names="">photos</text:span></text:p>
          </draw:text-box>
          <svg:title/>
          <svg:desc/>
        </draw:frame>
        <draw:frame draw:id="id89" draw:style-name="a607" draw:name="TextBox 17" svg:x="4.88543in" svg:y="2.65197in" svg:width="1.61417in" svg:height="0.28543in">
          <draw:text-box>
            <text:p text:style-name="a606" text:class-names="" text:cond-style-name=""><text:span text:style-name="a605" text:class-names="">Pothole Detection</text:span></text:p>
          </draw:text-box>
          <svg:title/>
          <svg:desc/>
        </draw:frame>
        <draw:frame draw:id="id90" draw:style-name="a612" draw:name="TextBox 18" svg:x="4.75in" svg:y="4.8748in" svg:width="1.80748in" svg:height="0.47205in">
          <draw:text-box>
            <text:p text:style-name="a609" text:class-names="" text:cond-style-name=""><text:span text:style-name="a608" text:class-names="">ESP32 controller</text:span></text:p>
            <text:p text:style-name="a611" text:class-names="" text:cond-style-name=""><text:span text:style-name="a610" text:class-names="">for Rover Movement</text:span></text:p>
          </draw:text-box>
          <svg:title/>
          <svg:desc/>
        </draw:frame>
        <draw:frame draw:id="id91" draw:style-name="a619" draw:name="TextBox 19" svg:x="9.5in" svg:y="0.5in" svg:width="1.27087in" svg:height="0.65866in">
          <draw:text-box>
            <text:p text:style-name="a614" text:class-names="" text:cond-style-name=""><text:span text:style-name="a613" text:class-names="">RTK (GPS for</text:span></text:p>
            <text:p text:style-name="a616" text:class-names="" text:cond-style-name=""><text:span text:style-name="a615" text:class-names="">Autonomous</text:span></text:p>
            <text:p text:style-name="a618" text:class-names="" text:cond-style-name=""><text:span text:style-name="a617" text:class-names="">Navigation</text:span></text:p>
          </draw:text-box>
          <svg:title/>
          <svg:desc/>
        </draw:frame>
        <draw:frame draw:id="id92" draw:style-name="a626" draw:name="TextBox 20" svg:x="9.5in" svg:y="1.84134in" svg:width="1.48425in" svg:height="0.65866in">
          <draw:text-box>
            <text:p text:style-name="a621" text:class-names="" text:cond-style-name=""><text:span text:style-name="a620" text:class-names="">Jetson Nano</text:span></text:p>
            <text:p text:style-name="a623" text:class-names="" text:cond-style-name=""><text:span text:style-name="a622" text:class-names="">Processes the</text:span></text:p>
            <text:p text:style-name="a625" text:class-names="" text:cond-style-name=""><text:span text:style-name="a624" text:class-names="">entire Operation</text:span></text:p>
          </draw:text-box>
          <svg:title/>
          <svg:desc/>
        </draw:frame>
        <draw:connector draw:type="standard" svg:x1="9.59733in" svg:y1="1.53843in" draw:start-shape="id79" draw:start-glue-point="2" svg:x2="8.82929in" svg:y2="1.72961in" draw:end-shape="id78" draw:end-glue-point="0" draw:id="id93" draw:style-name="a628" draw:transform="translate(-9.21331in -1.63402in) rotate(-4.71239) translate(9.21331in 1.63402in)" draw:name="Connector: Elbow 21">
          <svg:title/>
          <svg:desc/>
        </draw:connector>
        <draw:frame draw:id="id94" draw:style-name="a629" svg:x="-1.25in" svg:y="2.5in" svg:width="6.93701in" svg:height="3.89528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634" draw:name="TextBox 23" svg:x="9.35433in" svg:y="3.75in" svg:width="1.66929in" svg:height="0.47205in">
          <draw:text-box>
            <text:p text:style-name="a631" text:class-names="" text:cond-style-name=""><text:span text:style-name="a630" text:class-names="">Output</text:span></text:p>
            <text:p text:style-name="a633" text:class-names="" text:cond-style-name=""><text:span text:style-name="a632" text:class-names="">(Pothole Detected)</text:span></text:p>
          </draw:text-box>
          <svg:title/>
          <svg:desc/>
        </draw:frame>
        <draw:custom-shape svg:x="3.25in" svg:y="4.25in" svg:width="1.25in" svg:height="0in" draw:id="id96" draw:style-name="a638" draw:name="Straight Connector 24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7" draw:style-name="a641" draw:name="TextBox 25" svg:x="2.1874in" svg:y="5.25in" svg:width="1.0626in" svg:height="0.31732in">
          <draw:text-box>
            <text:p text:style-name="a640" text:class-names="" text:cond-style-name=""><text:span text:style-name="a639" text:class-names="">Road Bot</text:span></text:p>
          </draw:text-box>
          <svg:title/>
          <svg:desc/>
        </draw:frame>
        <presentation:notes draw:style-name="a647">
          <draw:frame draw:id="id98" draw:style-name="a644" draw:name="Slide Number Placeholder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99" presentation:style-name="a645" draw:name="Slide Image Placeholder 1">
            <svg:title/>
            <svg:desc/>
          </draw:page-thumbnail>
          <draw:frame draw:id="id100" presentation:style-name="a6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586" svg:viewBox="0 0 20 30" svg:d="m10 0-10 30h20z"/>
    <draw:marker draw:name="a575" svg:viewBox="0 0 20 30" svg:d="m10 0-10 30h20z"/>
    <draw:marker draw:name="a637" svg:viewBox="0 0 20 30" svg:d="m10 0-10 30h20z"/>
    <draw:marker draw:name="a581" svg:viewBox="0 0 20 30" svg:d="m10 0-10 30h20z"/>
    <draw:marker draw:name="a588" svg:viewBox="0 0 20 30" svg:d="m10 0-10 30h20z"/>
    <draw:marker draw:name="a627" svg:viewBox="0 0 20 30" svg:d="m10 0-10 30h20z"/>
    <draw:marker draw:name="a579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initial-creator>Santhosh Pream</meta:initial-creator>
    <dc:creator>Santhosh Pream</dc:creator>
    <meta:creation-date>2026-02-24T14:21:32Z</meta:creation-date>
    <dc:date>2026-02-24T10:23:43Z</dc:date>
    <meta:editing-cycles>1</meta:editing-cycles>
    <meta:editing-duration>PT1168S</meta:editing-duration>
    <meta:document-statistic meta:paragraph-count="20" meta:word-count="44"/>
  </office:meta>
</office:document-meta>
</file>